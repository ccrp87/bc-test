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sumen Ejecutivo</text:h>
      <text:p text:style-name="P2"/>
      <text:p text:style-name="P2">La presente propuesta define una arquitectura orientada a la automatización de procesos mediante <text:span text:style-name="Strong_20_Emphasis">n8n</text:span> como motor de orquestación, complementada con una plataforma de <text:span text:style-name="Strong_20_Emphasis">observabilidad basada en OpenTelemetry, Loki, Tempo y Grafana</text:span>, con el objetivo de proporcionar trazabilidad, monitoreo y capacidad de diagnóstico sobre los flujos automatizados.</text:p>
      <text:p text:style-name="P2">La solución plantea el uso de n8n como componente central para la ejecución de workflows e integración con sistemas externos mediante APIs, Webhooks y conectores especializados. Sobre esta capa se incorpora un modelo de captura de eventos de ejecución que permite registrar información relevante del comportamiento de los procesos, incluyendo inicio y finalización de workflows, ejecución de nodos, estados de procesamiento, tiempos de respuesta e identificadores de correlación.</text:p>
      <text:p text:style-name="P2">La arquitectura propuesta utiliza <text:span text:style-name="Strong_20_Emphasis">OpenTelemetry</text:span> como estándar para la recopilación y distribución de telemetría, permitiendo desacoplar la generación de información operacional de las herramientas específicas de almacenamiento y visualización. Los registros de eventos son almacenados en <text:span text:style-name="Strong_20_Emphasis">Loki</text:span>, mientras que la información de trazabilidad distribuida es gestionada mediante <text:span text:style-name="Strong_20_Emphasis">Tempo</text:span>. Finalmente, <text:span text:style-name="Strong_20_Emphasis">Grafana</text:span> proporciona una capa unificada para la construcción de dashboards, análisis operativo y correlación entre logs y trazas.</text:p>
      <text:p text:style-name="P2">Esta arquitectura permite obtener una visión integral de la ejecución de los procesos automatizados, facilitando la identificación de errores, análisis de rendimiento y seguimiento del ciclo completo de una transacción mediante mecanismos como <text:span text:style-name="Source_20_Text">execution_id</text:span>, <text:span text:style-name="Source_20_Text">trace_id</text:span> y <text:span text:style-name="Source_20_Text">span_id</text:span>.</text:p>
      <text:p text:style-name="P2">Dentro de las decisiones tecnológicas se priorizaron criterios de escalabilidad, mantenibilidad, desacoplamiento y adopción de estándares abiertos. La separación entre el motor de automatización y la plataforma de observabilidad permite evolucionar cada componente de manera independiente, facilitando futuras integraciones con ambientes productivos y plataformas empresariales.</text:p>
      <text:p text:style-name="P2">Durante el desarrollo de la prueba técnica se definió y validó el diseño arquitectónico; sin embargo, la implementación completa de la captura de eventos internos de n8n no fue ejecutada debido a restricciones del alcance establecido para el ambiente de evaluación local. La instrumentación completa requiere un despliegue persistente del motor n8n, configuración adicional del runtime y componentes complementarios de observabilidad.</text:p>
      <text:p text:style-name="P2">Como evolución posterior, la solución propuesta permite implementar una plataforma completa de monitoreo para procesos automatizados, reduciendo tiempos de diagnóstico, mejorando la operación de los workflows y proporcionando capacidades de auditoría y seguimiento necesarias para escenarios empresariales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21T04:18:14.229656055</meta:creation-date>
    <dc:date>2026-07-21T04:19:07.103885450</dc:date>
    <meta:editing-duration>PT53S</meta:editing-duration>
    <meta:editing-cycles>1</meta:editing-cycles>
    <meta:document-statistic meta:table-count="0" meta:image-count="0" meta:object-count="0" meta:page-count="1" meta:paragraph-count="8" meta:word-count="363" meta:character-count="2753" meta:non-whitespace-character-count="2398"/>
    <meta:generator>LibreOffice/26.2.4.2$Linux_X86_64 LibreOffice_project/620$Build-2</meta:generator>
  </office:meta>
</office:document-meta>
</file>