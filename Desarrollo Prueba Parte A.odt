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11BC00000C38775A77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in" fo:margin-right="0in" fo:text-indent="0in" style:auto-text-indent="false"/>
    </style:style>
    <style:style style:name="P2" style:family="paragraph" style:parent-style-name="Heading_20_3">
      <style:paragraph-properties fo:margin-top="0in" fo:margin-bottom="0.0972in" style:contextual-spacing="false" fo:line-height="115%"/>
    </style:style>
    <style:style style:name="P3" style:family="paragraph" style:parent-style-name="Text_20_body" style:list-style-name="L2">
      <style:paragraph-properties fo:margin-left="0in" fo:margin-right="0in" fo:text-indent="0in" style:auto-text-indent="false"/>
      <style:text-properties officeooo:paragraph-rsid="00126068"/>
    </style:style>
    <style:style style:name="P4" style:family="paragraph" style:parent-style-name="Text_20_body" style:list-style-name="L2">
      <style:paragraph-properties fo:margin-left="0in" fo:margin-right="0in" fo:text-indent="0in" style:auto-text-indent="false"/>
    </style:style>
    <style:style style:name="P5" style:family="paragraph" style:parent-style-name="Text_20_body" style:list-style-name="L3">
      <style:paragraph-properties fo:margin-left="0in" fo:margin-right="0in" fo:text-indent="0in" style:auto-text-indent="false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font-weight="bold" officeooo:paragraph-rsid="00126068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paragraph-rsid="00126068"/>
    </style:style>
    <style:style style:name="P8" style:family="paragraph" style:parent-style-name="Text_20_body">
      <style:text-properties fo:font-weight="bold"/>
    </style:style>
    <style:style style:name="P9" style:family="paragraph" style:parent-style-name="Text_20_body" style:list-style-name="L4">
      <style:paragraph-properties fo:margin-left="0in" fo:margin-right="0in" fo:text-indent="0in" style:auto-text-indent="false"/>
    </style:style>
    <style:style style:name="P10" style:family="paragraph" style:parent-style-name="Text_20_body" style:list-style-name="L5">
      <style:paragraph-properties fo:margin-left="0in" fo:margin-right="0in" fo:text-indent="0in" style:auto-text-indent="false"/>
    </style:style>
    <style:style style:name="P11" style:family="paragraph" style:parent-style-name="Text_20_body">
      <style:paragraph-properties fo:margin-left="0in" fo:margin-right="0in" fo:text-indent="0in" style:auto-text-indent="false"/>
    </style:style>
    <style:style style:name="P12" style:family="paragraph" style:parent-style-name="Text_20_body" style:list-style-name="L6">
      <style:paragraph-properties fo:margin-left="0in" fo:margin-right="0in" fo:text-indent="0in" style:auto-text-indent="false"/>
    </style:style>
    <style:style style:name="P13" style:family="paragraph" style:parent-style-name="Text_20_body" style:list-style-name="L7">
      <style:paragraph-properties fo:margin-left="0in" fo:margin-right="0in" fo:text-indent="0in" style:auto-text-indent="false"/>
    </style:style>
    <style:style style:name="P14" style:family="paragraph" style:parent-style-name="Text_20_body" style:list-style-name="L8">
      <style:paragraph-properties fo:margin-left="0in" fo:margin-right="0in" fo:text-indent="0in" style:auto-text-indent="false"/>
    </style:style>
    <style:style style:name="P15" style:family="paragraph" style:parent-style-name="Text_20_body" style:list-style-name="L9">
      <style:paragraph-properties fo:margin-left="0in" fo:margin-right="0in" fo:text-indent="0in" style:auto-text-indent="false"/>
    </style:style>
    <style:style style:name="P16" style:family="paragraph" style:parent-style-name="Text_20_body" style:list-style-name="L10">
      <style:paragraph-properties fo:margin-left="0in" fo:margin-right="0in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officeooo:rsid="0012606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PUESTA DE MODERNIZACIÓN ARQUITECTÓNICA XYZ LTDA.</text:h>
      <text:p text:style-name="Text_20_body"/>
      <text:h text:style-name="Heading_20_3" text:outline-level="3">Supuestos de Estrategia y Negocio</text:h>
      <text:list text:style-name="L1">
        <text:list-item>
          <text:p text:style-name="P1"><text:bookmark text:name="p-rc_f3c2d315ae3f8108-560"/><text:span text:style-name="T1">Línea de tiempo estricta:</text:span> Asumí como punto de partida julio de 2026, lo que nos definió un margen de ejecución comprimido de 17 meses para cumplir la meta de apagar la plataforma <text:span text:style-name="T2">core</text:span> antes de diciembre de 2027.</text:p>
        </text:list-item>
        <text:list-item>
          <text:p text:style-name="P1"><text:bookmark text:name="p-rc_f3c2d315ae3f8108-561"/><text:span text:style-name="T1">Tolerancia cero a la interrupción operativa:</text:span> Asumí que el negocio no aceptará ventanas de inactividad durante la migración. Por esto, propuse el patrón <text:span text:style-name="T2">Strangler Fig</text:span> y la estrategia de <text:span text:style-name="T2">Shadow Testing</text:span>.</text:p>
        </text:list-item>
        <text:list-item>
          <text:p text:style-name="P1"><text:bookmark text:name="p-rc_f3c2d315ae3f8108-562"/><text:span text:style-name="T1">Disponibilidad presupuestal por ahorro (FinOps):</text:span> Asumí que el desmantelamiento de la infraestructura pesada de Automation Anywhere liberará el presupuesto necesario para financiar el ecosistema nuevo (orquestadores, BPM, observabilidad).</text:p>
        </text:list-item>
      </text:list>
      <text:h text:style-name="P2" text:outline-level="3">Supuestos Técnicos y Arquitectónicos</text:h>
      <text:list text:style-name="L2">
        <text:list-item>
          <text:p text:style-name="P3"><text:bookmark text:name="p-rc_f3c2d315ae3f8108-563"/><text:span text:style-name="T1">Madurez y disponibilidad de infraestructura Cloud:</text:span> Asumí que la organización cuenta con (o puede desplegar) un entorno en la nube moderno que soporta API Gateways, Kubernetes/Serverless, bóvedas de secretos (Vault) y <text:span text:style-name="T2">Message Brokers</text:span> como Kafka.</text:p>
        </text:list-item>
        <text:list-item>
          <text:p text:style-name="P3"><text:bookmark text:name="p-rc_f3c2d315ae3f8108-564"/><text:span text:style-name="T1">Causa raíz de la fragmentación:</text:span> Asumí que el altísimo volumen de 12.000 <text:span text:style-name="T2">taskbots</text:span> no responde a una necesidad funcional real, sino que es el resultado directo de la falta de gobierno en los despliegues históricos. Esto justifica la imposición de controles rígidos como GitOps y revisión obligatoria de código mediante <text:span text:style-name="T2">Pull Requests</text:span>.</text:p>
        </text:list-item>
        <text:list-item>
          <text:p text:style-name="P4"><text:bookmark text:name="p-rc_f3c2d315ae3f8108-565"/><text:span text:style-name="T1">Viabilidad de las APIs:</text:span> Asumí que la mayoría de los sistemas <text:span text:style-name="T2">core</text:span> de la empresa exponen interfaces de programación modernas o que los equipos de <text:span text:style-name="T2">backend</text:span> tienen la capacidad de construirlas, dejando el RPA selectivo solo para las excepciones <text:span text:style-name="T2">legacy</text:span>.</text:p>
        </text:list-item>
      </text:list>
      <text:h text:style-name="P2" text:outline-level="3">Supuestos Operativos y de Talento (Gestión del Cambio)</text:h>
      <text:list text:style-name="L3">
        <text:list-item>
          <text:p text:style-name="P5"><text:bookmark text:name="p-rc_f3c2d315ae3f8108-566"/><text:span text:style-name="T1">Reconversión del Talento (Upskilling):</text:span> En lugar de asumir que el equipo RPA adoptará tecnologías complejas mágicamente de un día para otro , asumí que la empresa apoyará un <text:span text:style-name="T2">bootcamp</text:span> intensivo durante la Ola 0 para enseñarles integración de APIs y lógicas <text:span text:style-name="T2">Low-Code</text:span>.</text:p>
        </text:list-item>
        <text:list-item>
          <text:p text:style-name="P5"><text:bookmark text:name="p-rc_f3c2d315ae3f8108-567"/><text:span text:style-name="T1">Ecosistema centralizado de observabilidad:</text:span> Para que la trazabilidad basada en <text:span text:style-name="T2">Correlation ID</text:span> funcione, asumí que la empresa está dispuesta a centralizar sus métricas y cuenta con plataformas unificadas (como Datadog, Elastic Stack, etc.) que permiten configurar alertas tempranas.</text:p>
        </text:list-item>
        <text:list-item>
          <text:p text:style-name="P5"><text:bookmark text:name="p-rc_f3c2d315ae3f8108-568"/><text:span text:style-name="T1">Disponibilidad de dueños de producto (Owners):</text:span> Al proponer un <text:span text:style-name="T2">Developer Portal</text:span> donde cada componente tendrá un equipo "Owner" claro , asumí que la organización tiene roles <text:soft-page-break/>definidos y un sistema funcional para gestionar el soporte técnico y el ciclo de vida del software.</text:p>
        </text:list-item>
      </text:list>
      <text:p text:style-name="Text_20_body"/>
      <text:h text:style-name="Heading_20_3" text:outline-level="3">Bloque A. Estrategia de Migración y Gestión del Cambio</text:h>
      <text:p text:style-name="P6"><text:bookmark text:name="p-rc_00a244a96d3ec13f-499"/>1. Estrategia general de migración (hacia diciembre de 2027)</text:p>
      <text:p text:style-name="P7"><text:span text:style-name="T3">Esta estrategia </text:span>adopta un modelo de reingeniería <text:span text:style-name="T2">API-First</text:span>. Dado el límite de 17 meses (julio 2026 a diciembre 2027) , usaremos el patrón <text:span text:style-name="T2">Strangler Fig</text:span> con un componente adicional de <text:span text:style-name="T1">Gestión de Estado</text:span>: mientras los flujos de <text:span text:style-name="T2">backend</text:span> reemplazan paulatinamente a los RPAs, implementaremos cachés distribuidos (ej. Redis) para manejar el estado de las transacciones que transiten entre el ecosistema antiguo y el nuevo.</text:p>
      <text:p text:style-name="P8">2. Criterios de priorización (Valor, Riesgo, Complejidad, Dependencia, Consolidación)</text:p>
      <text:list text:style-name="L4">
        <text:list-item>
          <text:p text:style-name="P9"><text:bookmark text:name="p-rc_00a244a96d3ec13f-500"/><text:span text:style-name="T1">Facilidad de consolidación:</text:span> Prioridad Máxima. Agrupar taskbots redundantes genera resultados rápidos.</text:p>
        </text:list-item>
        <text:list-item>
          <text:p text:style-name="P9"><text:bookmark text:name="p-rc_00a244a96d3ec13f-501"/><text:span text:style-name="T1">Dependencia técnica y Valor:</text:span> Prioridad Alta. Los bots inestables por cambios de UI que afecten la facturación o al cliente pasan a APIs urgentemente.</text:p>
        </text:list-item>
        <text:list-item>
          <text:p text:style-name="P9"><text:bookmark text:name="p-rc_00a244a96d3ec13f-502"/><text:span text:style-name="T1">Riesgo y Complejidad:</text:span> Prioridad Baja. Se dejan para fases maduras del proyecto.</text:p>
        </text:list-item>
        <text:list-item>
          <text:p text:style-name="P9"><text:bookmark text:name="p-rc_00a244a96d3ec13f-503"/><text:span text:style-name="T2">Añadido Estratégico (Upskilling):</text:span> Los procesos de baja complejidad serán utilizados como <text:span text:style-name="T2">bootcamp</text:span> (Low-Code/APIs) para que el actual equipo de RPA evolucione sus habilidades tecnológicas.</text:p>
        </text:list-item>
      </text:list>
      <text:p text:style-name="P8">3. División por Olas (Roadmap a 17 meses)</text:p>
      <text:list text:style-name="L5">
        <text:list-item>
          <text:p text:style-name="P10"><text:bookmark text:name="p-rc_00a244a96d3ec13f-504"/><text:span text:style-name="T1">Ola 0 (Meses 1-3):</text:span> Fundación tecnológica, limpieza del inventario de 12.000 taskbots y <text:span text:style-name="T2">Upskilling</text:span> del equipo.</text:p>
        </text:list-item>
        <text:list-item>
          <text:p text:style-name="P10"><text:bookmark text:name="p-rc_00a244a96d3ec13f-505"/><text:span text:style-name="T1">Ola 1 (Meses 4-8):</text:span> Consolidación masiva de <text:span text:style-name="T2">Quick Wins</text:span> mediante múltiples <text:span text:style-name="T2">releases</text:span> técnicos continuos.</text:p>
        </text:list-item>
        <text:list-item>
          <text:p text:style-name="P10"><text:bookmark text:name="p-rc_00a244a96d3ec13f-506"/><text:span text:style-name="T1">Ola 2 (Meses 9-14):</text:span> Refactorización crítica para los procesos de alto valor y riesgo (BPM/APIs).</text:p>
        </text:list-item>
        <text:list-item>
          <text:p text:style-name="P10"><text:bookmark text:name="p-rc_00a244a96d3ec13f-507"/><text:span text:style-name="T1">Ola 3 (Meses 15-17):</text:span> Transición de excepciones al RPA selectivo y apagado definitivo de Automation Anywhere.</text:p>
        </text:list-item>
      </text:list>
      <text:p text:style-name="P11"><text:bookmark text:name="p-rc_00a244a96d3ec13f-508"/><text:span text:style-name="T1">4. Justificación del RPA Selectivo</text:span> Se mantendrá únicamente para sistemas <text:span text:style-name="T2">legacy</text:span> sin APIs (ej. AS400, portales cerrados con bloqueos de <text:span text:style-name="T2">scraping</text:span>) o donde el costo de modernizar el sistema origen sea prohibitivo. Sin embargo, la condición innegociable será que <text:span text:style-name="T1">estos bots residuales se encapsulen y expongan como APIs</text:span> para ser consumidos por los orquestadores modernos.</text:p>
      <text:h text:style-name="Heading_20_3" text:outline-level="3"><text:soft-page-break/>Bloque B. Arquitectura, FinOps y Decisión Tecnológica</text:h>
      <text:p text:style-name="P11"><text:bookmark text:name="p-rc_00a244a96d3ec13f-509"/><text:span text:style-name="T1">5. Arquitectura de Alto Nivel</text:span> El diseño se basa en una Arquitectura Orientada a Eventos estructurada en cuatro capas:</text:p>
      <text:list text:style-name="L6">
        <text:list-item>
          <text:p text:style-name="P12"><text:bookmark text:name="p-rc_00a244a96d3ec13f-510"/><text:span text:style-name="T1">Interacción y Triggers:</text:span> API Gateways, Webhooks y Schedulers.</text:p>
        </text:list-item>
        <text:list-item>
          <text:p text:style-name="P12"><text:bookmark text:name="p-rc_00a244a96d3ec13f-511"/><text:span text:style-name="T1">Orquestación:</text:span> n8n para flujos ágiles y BPM para tareas con humanos.</text:p>
        </text:list-item>
        <text:list-item>
          <text:p text:style-name="P12"><text:bookmark text:name="p-rc_00a244a96d3ec13f-512"/><text:span text:style-name="T1">Ejecución:</text:span> Microservicios en Kubernetes/Serverless y RPA Selectivo.</text:p>
        </text:list-item>
        <text:list-item>
          <text:p text:style-name="P12"><text:bookmark text:name="p-rc_00a244a96d3ec13f-513"/><text:span text:style-name="T1">Fundación y FinOps:</text:span> IAM, Bóveda de secretos (Vault) , y un marco estricto de control de costos <text:span text:style-name="T2">Cloud</text:span> bajo demanda (monitoreando el costo por transacción de los nuevos microservicios).</text:p>
        </text:list-item>
      </text:list>
      <text:p text:style-name="P11"><draw:frame draw:style-name="fr1" draw:name="Image1" text:anchor-type="char" svg:width="6.9252in" svg:height="4.7709in" draw:z-index="0"><draw:image xlink:href="Pictures/10000001000011BC00000C38775A7747.png" xlink:type="simple" xlink:show="embed" xlink:actuate="onLoad" draw:mime-type="image/png"/></draw:frame></text:p>
      <text:p text:style-name="P8">6. Criterio de Decisión y Vendor Lock-in</text:p>
      <text:list text:style-name="L7">
        <text:list-item>
          <text:p text:style-name="P13"><text:bookmark text:name="p-rc_00a244a96d3ec13f-514"/><text:span text:style-name="T1">BPM:</text:span> Para procesos de larga duración y aprobación humana.</text:p>
        </text:list-item>
        <text:list-item>
          <text:p text:style-name="P13"><text:bookmark text:name="p-rc_00a244a96d3ec13f-515"/><text:span text:style-name="T1">n8n:</text:span> Para flujos ágiles <text:span text:style-name="T2">backend-to-backend</text:span> basados en eventos.</text:p>
        </text:list-item>
        <text:list-item>
          <text:p text:style-name="P13"><text:bookmark text:name="p-rc_00a244a96d3ec13f-516"/><text:span text:style-name="T1">Power Platform:</text:span> Limitado estrictamente a interacciones de usuario final atadas al ecosistema Microsoft 365, para mitigar el riesgo de un nuevo <text:span text:style-name="T2">Vendor Lock-in</text:span>.</text:p>
        </text:list-item>
        <text:list-item>
          <text:p text:style-name="P13"><text:bookmark text:name="p-rc_00a244a96d3ec13f-517"/><text:soft-page-break/><text:span text:style-name="T1">Microservicios:</text:span> Lógica core y componentes altamente reutilizables que residirán en contenedores portables.</text:p>
        </text:list-item>
      </text:list>
      <text:p text:style-name="P11"><text:bookmark text:name="p-rc_00a244a96d3ec13f-518"/><text:span text:style-name="T1">7. Trazabilidad End-to-End</text:span> Implementación obligatoria de un <text:span text:style-name="T1">Correlation ID</text:span>. El API Gateway lo inyecta en la cabecera (header). Cada salto de sistema (BPM, API, RPA) lo arrastra , y los logs en formato JSON se envían a un repositorio central (ej. Datadog) para visualizar la traza completa.</text:p>
      <text:p text:style-name="P8">8. Seguridad, Observabilidad y Gobierno</text:p>
      <text:list text:style-name="L8">
        <text:list-item>
          <text:p text:style-name="P14"><text:bookmark text:name="p-rc_00a244a96d3ec13f-519"/><text:span text:style-name="T1">Seguridad:</text:span> Mínimo privilegio, cero credenciales en código, uso exclusivo de Vault y OAuth2.</text:p>
        </text:list-item>
        <text:list-item>
          <text:p text:style-name="P14"><text:bookmark text:name="p-rc_00a244a96d3ec13f-520"/><text:span text:style-name="T1">Observabilidad:</text:span> Integración de Prometheus/Grafana para métricas de rendimiento y alertas tempranas.</text:p>
        </text:list-item>
        <text:list-item>
          <text:p text:style-name="P14"><text:bookmark text:name="p-rc_00a244a96d3ec13f-521"/><text:span text:style-name="T1">Gobierno:</text:span> Adopción total de GitOps, requiriendo <text:span text:style-name="T2">Pull Requests</text:span> y CI/CD automatizado.</text:p>
        </text:list-item>
      </text:list>
      <text:h text:style-name="Heading_20_3" text:outline-level="3">Bloque C. Consolidación y Reutilización</text:h>
      <text:p text:style-name="P11"><text:bookmark text:name="p-rc_00a244a96d3ec13f-522"/><text:span text:style-name="T1">9. Consolidación de 50 automatizaciones parecidas</text:span> Aplicaremos el principio DRY (<text:span text:style-name="T2">Don't Repeat Yourself</text:span>) mediante un patrón de Plantilla Estratégica. Extraemos el patrón core en un único microservicio parametrizado, y las 50 automatizaciones antiguas se convierten en simples <text:span text:style-name="T2">triggers</text:span> que inyectan el <text:span text:style-name="T2">payload</text:span> dinámico en tiempo de ejecución.</text:p>
      <text:p text:style-name="P11"><text:bookmark text:name="p-rc_00a244a96d3ec13f-523"/><text:span text:style-name="T1">10. Prevención de la fragmentación futura</text:span> Se bloquean los despliegues manuales mediante GitOps. Además, se integra análisis de código estático (ej. SonarQube); si el <text:span text:style-name="T2">pipeline</text:span> detecta bloques lógicos duplicados durante un <text:span text:style-name="T2">Pull Request</text:span>, el despliegue falla automáticamente forzando la reutilización.</text:p>
      <text:p text:style-name="P11"><text:bookmark text:name="p-rc_00a244a96d3ec13f-524"/><text:span text:style-name="T1">11. Catalogación y Versionamiento</text:span> Implementación de un <text:span text:style-name="T1">Developer Portal</text:span> (ej. Backstage) utilizando Versionamiento Semántico (SemVer). Cada componente catalogado expondrá automáticamente en el portal al equipo técnico <text:span text:style-name="T2">Owner</text:span> (dueño responsable) garantizando el soporte.</text:p>
      <text:h text:style-name="Heading_20_3" text:outline-level="3">Bloque D. Implementación Técnica y Resiliencia</text:h>
      <text:p text:style-name="P8">12. Flujo Técnico, Errores y Rollback</text:p>
      <text:list text:style-name="L9">
        <text:list-item>
          <text:p text:style-name="P15"><text:bookmark text:name="p-rc_00a244a96d3ec13f-525"/><text:span text:style-name="T1">Fallas de red (Transitorias):</text:span> Uso de <text:span text:style-name="T2">Exponential Backoff</text:span> para no saturar sistemas caídos.</text:p>
        </text:list-item>
        <text:list-item>
          <text:p text:style-name="P15"><text:bookmark text:name="p-rc_00a244a96d3ec13f-526"/><text:span text:style-name="T1">Fallas Críticas (Negocio):</text:span> Enrutamiento automático a una <text:span text:style-name="T2">Dead Letter Queue</text:span> (DLQ) con alertas para revisión.</text:p>
        </text:list-item>
        <text:list-item>
          <text:p text:style-name="P15"><text:bookmark text:name="p-rc_00a244a96d3ec13f-527"/><text:span text:style-name="T1">Rollback Distribuido:</text:span> Uso del Patrón Saga para ejecutar transacciones compensatorias que deshagan pasos previos si un flujo falla a la mitad.</text:p>
        </text:list-item>
        <text:list-item>
          <text:p text:style-name="P15"><text:bookmark text:name="p-rc_00a244a96d3ec13f-528"/><text:span text:style-name="T2">Añadido:</text:span> Implementación de <text:span text:style-name="T2">Circuit Breakers</text:span> para aislar sistemas lentos e impedir el colapso del orquestador.</text:p>
        </text:list-item>
      </text:list>
      <text:p text:style-name="P11"><text:bookmark text:name="p-rc_00a244a96d3ec13f-529"/><text:span text:style-name="T1">13. Pruebas para la transición (Shadow Testing)</text:span> Ejecutaremos el bot antiguo y el nuevo microservicio en paralelo frente a las mismas peticiones. El microservicio operará en modo "sombra" (registra el resultado esperado pero no altera la base de datos). Solo cuando exista coincidencia del 100% de los resultados frente al bot antiguo, se autoriza el <text:span text:style-name="T2">cut-over</text:span>.</text:p>
      <text:p text:style-name="P11"><text:bookmark text:name="p-rc_00a244a96d3ec13f-530"/><text:soft-page-break/><text:span text:style-name="T1">14. Documentación de operación</text:span> Evolucionamos a <text:span text:style-name="T1">Docs-as-Code</text:span>. La documentación vivirá en el repositorio mediante Swagger/OpenAPI. El equipo de soporte recibirá <text:span text:style-name="T2">Runbooks</text:span> vivos y accionables vinculados a la observabilidad ("Si falla X, revisa dashboard Y").</text:p>
      <text:p text:style-name="P8">15. Indicadores de valor a 90 días</text:p>
      <text:list text:style-name="L10">
        <text:list-item>
          <text:p text:style-name="P16"><text:bookmark text:name="p-rc_00a244a96d3ec13f-531"/>Tasa de Éxito (<text:span text:style-name="T2">Success Rate</text:span>).</text:p>
        </text:list-item>
        <text:list-item>
          <text:p text:style-name="P16"><text:bookmark text:name="p-rc_00a244a96d3ec13f-532"/>Reducción del <text:span text:style-name="T2">Cycle Time</text:span> (pasando de simular clics lentos a llamadas API en milisegundos).</text:p>
        </text:list-item>
        <text:list-item>
          <text:p text:style-name="P16"><text:bookmark text:name="p-rc_00a244a96d3ec13f-533"/>Reducción de horas de deuda técnica por incidentes.</text:p>
        </text:list-item>
        <text:list-item>
          <text:p text:style-name="P16"><text:bookmark text:name="p-rc_00a244a96d3ec13f-534"/>Índice de Reutilización del catálogo de componentes.</text:p>
        </text:list-item>
      </text:list>
      <text:h text:style-name="Heading_20_3" text:outline-level="3">Bloque E. Trabajo en Equipo y Criterio</text:h>
      <text:p text:style-name="P11"><text:bookmark text:name="p-rc_00a244a96d3ec13f-535"/><text:span text:style-name="T1">16. Presión por rapidez vs. Control</text:span> Implementaremos <text:span text:style-name="T1">Seguridad Shift-Left</text:span>. Las validaciones de arquitectura y vulnerabilidades (SAST/DAST) se automatizarán dentro de los pipelines CI/CD. Si las pruebas pasan, el despliegue es rápido; si no, se bloquea en la máquina del desarrollador. Se apoyará con un Comité Ágil semanal.</text:p>
      <text:p text:style-name="P11"><text:bookmark text:name="p-rc_00a244a96d3ec13f-536"/><text:span text:style-name="T1">17. Manejo de dependencias no documentadas</text:span> Si descubrimos un riesgo, pausamos inmediatamente el <text:span text:style-name="T2">cut-over</text:span> de esa pieza. Utilizamos APM para mapear activamente a dónde se conecta el bot antiguo. Mantenemos una mitigación híbrida hasta aislar y cubrir la dependencia con cero riesgo.</text:p>
      <text:p text:style-name="P11"><text:bookmark text:name="p-rc_00a244a96d3ec13f-537"/><text:span text:style-name="T1">18. Comunicación asertiva con el negocio (UI vs Backend)</text:span> Se evita el lenguaje técnico. Se negocia con datos duros: se vende la solución <text:span text:style-name="T2">backend</text:span> demostrando cómo la vía actual (UI) retrasa sus KPIs y cómo el nuevo sistema es una "vía rápida y exclusiva" libre de caídas por roturas estéticas.</text:p>
      <text:p text:style-name="P11"><text:bookmark text:name="p-rc_00a244a96d3ec13f-538"/><text:span text:style-name="T1">19. Redirección de requerimientos de negocio (Complencia)</text:span> Asumiré un rol consultivo validando el dolor subyacente. Presentaré la alternativa basándome en análisis comparativos de costos y tiempos , apoyándome en <text:span text:style-name="T1">Pruebas de Concepto (PoC)</text:span> rápidas para vencer el escepticismo de forma tangible.</text:p>
      <text:p text:style-name="P11"><text:bookmark text:name="p-rc_00a244a96d3ec13f-539"/><text:span text:style-name="T1">20. Error común a evitar (Complencia)</text:span> El mayor riesgo es crear un <text:span text:style-name="T1">"Monolito Distribuido"</text:span> conectando cientos de microservicios de forma síncrona. Lo evitaré garantizando asincronismo a través de <text:span text:style-name="T2">Message Brokers</text:span> (como Kafka) para que los servicios publiquen y consuman eventos de forma independient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9T20:35:57.162381827</meta:creation-date>
    <dc:date>2026-07-19T20:53:43.797688612</dc:date>
    <meta:editing-duration>PT5M39S</meta:editing-duration>
    <meta:editing-cycles>2</meta:editing-cycles>
    <meta:generator>LibreOffice/26.2.4.2$Linux_X86_64 LibreOffice_project/620$Build-2</meta:generator>
    <meta:document-statistic meta:table-count="0" meta:image-count="1" meta:object-count="0" meta:page-count="5" meta:paragraph-count="66" meta:word-count="1480" meta:character-count="9881" meta:non-whitespace-character-count="8503"/>
  </office:meta>
</office:document-meta>
</file>