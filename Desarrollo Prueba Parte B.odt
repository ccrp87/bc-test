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000000F78437144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1035in"/>
    </style:style>
    <style:style style:name="Table1.B" style:family="table-column">
      <style:table-column-properties style:column-width="4.821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3646in"/>
    </style:style>
    <style:style style:name="Table2.B" style:family="table-column">
      <style:table-column-properties style:column-width="0.666in"/>
    </style:style>
    <style:style style:name="Table2.C" style:family="table-column">
      <style:table-column-properties style:column-width="3.8944in"/>
    </style:style>
    <style:style style:name="Table2.A1" style:family="table-cell">
      <style:table-cell-properties style:vertical-align="middle" fo:padding="0.0194in" fo:border="none"/>
    </style:style>
    <style:style style:name="P1" style:family="paragraph" style:parent-style-name="Heading_20_3">
      <style:text-properties officeooo:rsid="0003aeb6" officeooo:paragraph-rsid="0003aeb6"/>
    </style:style>
    <style:style style:name="P2" style:family="paragraph" style:parent-style-name="Text_20_body">
      <style:text-properties officeooo:rsid="0003aeb6" officeooo:paragraph-rsid="0003aeb6"/>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Heading_20_1">
      <style:paragraph-properties fo:margin-top="0in" fo:margin-bottom="0.0972in" style:contextual-spacing="false" fo:line-height="115%"/>
    </style:style>
    <style:style style:name="T1" style:family="text">
      <style:text-properties officeooo:rsid="0003ae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rquitectura</text:h>
      <text:p text:style-name="P2"/>
      <text:p text:style-name="P2"><draw:frame draw:style-name="fr1" draw:name="Image1" text:anchor-type="char" svg:width="4.4083in" svg:height="8.4307in" draw:z-index="0"><draw:image xlink:href="Pictures/100000010000072000000F7843714489.png" xlink:type="simple" xlink:show="embed" xlink:actuate="onLoad" draw:mime-type="image/png"/></draw:frame></text:p>
      <text:h text:style-name="Heading_20_3" text:outline-level="3"><text:soft-page-break/></text:h>
      <text:h text:style-name="Heading_20_3" text:outline-level="3">Descripción de componentes</text:h>
      <text:h text:style-name="Heading_20_3" text:outline-level="3">1. n8n - Motor de automatización</text:h>
      <text:p text:style-name="Text_20_body">Responsable de la ejecución de los workflows y orquestación de las actividades del proceso.</text:p>
      <text:p text:style-name="Text_20_body">Funciones principales:</text:p>
      <text:list text:style-name="L1">
        <text:list-item>
          <text:p text:style-name="P3">Ejecución de flujos automatizados. </text:p>
        </text:list-item>
        <text:list-item>
          <text:p text:style-name="P3">Integración con sistemas externos mediante APIs, Webhooks y conectores. </text:p>
        </text:list-item>
        <text:list-item>
          <text:p text:style-name="P3">Gestión de lógica de negocio del proceso. </text:p>
        </text:list-item>
        <text:list-item>
          <text:p text:style-name="P4">Generación de eventos asociados al ciclo de ejecución. </text:p>
        </text:list-item>
      </text:list>
      <text:p text:style-name="Horizontal_20_Line"/>
      <text:h text:style-name="Heading_20_3" text:outline-level="3">2. Capa de observabilidad basada en OpenTelemetry</text:h>
      <text:p text:style-name="Text_20_body">Se incorpora una capa estándar de instrumentación mediante <text:span text:style-name="Strong_20_Emphasis">OpenTelemetry</text:span>, encargada de recolectar información operacional generada durante la ejecución.</text:p>
      <text:p text:style-name="Text_20_body">Eventos capturados:</text:p>
      <text:list text:style-name="L2">
        <text:list-item>
          <text:p text:style-name="P5">Inicio y finalización de workflows. </text:p>
        </text:list-item>
        <text:list-item>
          <text:p text:style-name="P5">Ejecución individual de nodos. </text:p>
        </text:list-item>
        <text:list-item>
          <text:p text:style-name="P5">Estados de éxito o error. </text:p>
        </text:list-item>
        <text:list-item>
          <text:p text:style-name="P5">Duración de ejecución. </text:p>
        </text:list-item>
        <text:list-item>
          <text:p text:style-name="P5">Identificadores de correlación (<text:span text:style-name="Source_20_Text">trace_id</text:span>, <text:span text:style-name="Source_20_Text">span_id</text:span>). </text:p>
        </text:list-item>
        <text:list-item>
          <text:p text:style-name="P6">Información contextual del proceso. </text:p>
        </text:list-item>
      </text:list>
      <text:p text:style-name="Text_20_body">Esta capa desacopla la generación de telemetría de las herramientas finales de almacenamiento y visualización.</text:p>
      <text:p text:style-name="Horizontal_20_Line"/>
      <text:h text:style-name="Heading_20_3" text:outline-level="3">3. OpenTelemetry Collector</text:h>
      <text:p text:style-name="Text_20_body">Componente intermedio encargado de:</text:p>
      <text:list text:style-name="L3">
        <text:list-item>
          <text:p text:style-name="P7">Recibir eventos generados por n8n. </text:p>
        </text:list-item>
        <text:list-item>
          <text:p text:style-name="P7">Procesar y enriquecer información de telemetría. </text:p>
        </text:list-item>
        <text:list-item>
          <text:p text:style-name="P7">Aplicar reglas de filtrado o transformación. </text:p>
        </text:list-item>
        <text:list-item>
          <text:p text:style-name="P8">Distribuir datos hacia los sistemas de observabilidad. </text:p>
        </text:list-item>
      </text:list>
      <text:p text:style-name="Horizontal_20_Line"/>
      <text:h text:style-name="Heading_20_3" text:outline-level="3">4. Loki - Gestión de logs</text:h>
      <text:p text:style-name="Text_20_body">Utilizado para almacenar eventos de ejecución y registros operativos.</text:p>
      <text:p text:style-name="Standard"><text:soft-page-break/></text:p>
      <text:p text:style-name="Standard"/>
      <text:h text:style-name="Heading_20_3" text:outline-level="3">5. Tempo - Trazabilidad distribuida</text:h>
      <text:p text:style-name="Text_20_body">Utilizado para almacenar trazas de ejecución.</text:p>
      <text:p text:style-name="Text_20_body">Permite:</text:p>
      <text:list text:style-name="L4">
        <text:list-item>
          <text:p text:style-name="P9">Visualizar el recorrido completo de un workflow. </text:p>
        </text:list-item>
        <text:list-item>
          <text:p text:style-name="P9">Identificar tiempos de ejecución por nodo. </text:p>
        </text:list-item>
        <text:list-item>
          <text:p text:style-name="P9">Encontrar puntos de falla. </text:p>
        </text:list-item>
        <text:list-item>
          <text:p text:style-name="P10">Relacionar un evento de log con una traza específica mediante <text:span text:style-name="Source_20_Text">trace_id</text:span>.</text:p>
        </text:list-item>
      </text:list>
      <text:p text:style-name="Horizontal_20_Line"/>
      <text:h text:style-name="Heading_20_3" text:outline-level="3">6. Grafana - Plataforma de visualización</text:h>
      <text:p text:style-name="Text_20_body">Consolida la información proveniente de Loki y Tempo.</text:p>
      <text:p text:style-name="Text_20_body">Permite construir:</text:p>
      <text:list text:style-name="L5">
        <text:list-item>
          <text:p text:style-name="P11">Dashboards operativos. </text:p>
        </text:list-item>
        <text:list-item>
          <text:p text:style-name="P11">Seguimiento de ejecuciones. </text:p>
        </text:list-item>
        <text:list-item>
          <text:p text:style-name="P11">Análisis de errores. </text:p>
        </text:list-item>
        <text:list-item>
          <text:p text:style-name="P11">Métricas de rendimiento. </text:p>
        </text:list-item>
        <text:list-item>
          <text:p text:style-name="P12">Navegación desde logs hacia trazas relacionadas. </text:p>
        </text:list-item>
      </text:list>
      <text:p text:style-name="Horizontal_20_Line"/>
      <text:h text:style-name="Heading_20_2" text:outline-level="2">Beneficios de la arquitectura</text:h>
      <text:list text:style-name="L6">
        <text:list-item>
          <text:p text:style-name="P13"><text:span text:style-name="Strong_20_Emphasis">Trazabilidad completa:</text:span> permite conocer qué ocurrió durante cada ejecución. </text:p>
        </text:list-item>
        <text:list-item>
          <text:p text:style-name="P13"><text:span text:style-name="Strong_20_Emphasis">Observabilidad centralizada:</text:span> concentra logs y trazas en una única plataforma. </text:p>
        </text:list-item>
        <text:list-item>
          <text:p text:style-name="P13"><text:span text:style-name="Strong_20_Emphasis">Diagnóstico eficiente:</text:span> facilita identificar fallos dentro de workflows complejos. </text:p>
        </text:list-item>
        <text:list-item>
          <text:p text:style-name="P13"><text:span text:style-name="Strong_20_Emphasis">Escalabilidad:</text:span> permite evolucionar desde un ambiente local hacia una implementación productiva. </text:p>
        </text:list-item>
        <text:list-item>
          <text:p text:style-name="P14"><text:span text:style-name="Strong_20_Emphasis">Desacoplamiento:</text:span> n8n no depende directamente de una herramienta específica de monitoreo. </text:p>
        </text:list-item>
      </text:list>
      <text:p text:style-name="Horizontal_20_Line"/>
      <text:h text:style-name="Heading_20_2" text:outline-level="2">Consideración de implementación</text:h>
      <text:p text:style-name="Text_20_body">Para el ambiente de prueba se presentó esta arquitectura como diseño objetivo. La implementación completa de la captura de eventos internos de n8n requiere un despliegue persistente del motor, configuración adicional del runtime y componentes complementarios de observabilidad, los cuales no <text:span text:style-name="T1">se configuraron sin embargo en grafana se aprecian logs basicos que se pueden ampliar</text:span>.</text:p>
      <text:p text:style-name="Text_20_body"/>
      <text:h text:style-name="Heading_20_2" text:outline-level="2"><text:soft-page-break/>Decisiones tecnológicas</text:h>
      <table:table table:name="Table1" table:style-name="Table1">
        <table:table-column table:style-name="Table1.A"/>
        <table:table-column table:style-name="Table1.B"/>
        <table:table-header-rows>
          <table:table-row>
            <table:table-cell table:style-name="Table1.A1" office:value-type="string">
              <text:p text:style-name="Table_20_Heading">Decisión</text:p>
            </table:table-cell>
            <table:table-cell table:style-name="Table1.A1" office:value-type="string">
              <text:p text:style-name="Table_20_Heading">Justificación</text:p>
            </table:table-cell>
          </table:table-row>
        </table:table-header-rows>
        <table:table-row>
          <table:table-cell table:style-name="Table1.A1" office:value-type="string">
            <text:p text:style-name="Table_20_Contents"><text:span text:style-name="Strong_20_Emphasis">Uso de n8n como motor de automatización</text:span></text:p>
          </table:table-cell>
          <table:table-cell table:style-name="Table1.A1" office:value-type="string">
            <text:p text:style-name="Table_20_Contents">Se selecciona n8n como plataforma de orquestación debido a su capacidad para integrar múltiples sistemas mediante conectores, APIs REST, Webhooks y flujos visuales, reduciendo el esfuerzo de desarrollo para automatizaciones complejas.</text:p>
          </table:table-cell>
        </table:table-row>
        <table:table-row>
          <table:table-cell table:style-name="Table1.A1" office:value-type="string">
            <text:p text:style-name="Table_20_Contents"><text:span text:style-name="Strong_20_Emphasis">Arquitectura basada en eventos para trazabilidad</text:span></text:p>
          </table:table-cell>
          <table:table-cell table:style-name="Table1.A1" office:value-type="string">
            <text:p text:style-name="Table_20_Contents">Se plantea un modelo de captura de eventos de ejecución para registrar el comportamiento de los workflows, permitiendo obtener visibilidad sobre el ciclo de vida de cada proceso automatizado.</text:p>
          </table:table-cell>
        </table:table-row>
        <table:table-row>
          <table:table-cell table:style-name="Table1.A1" office:value-type="string">
            <text:p text:style-name="Table_20_Contents"><text:span text:style-name="Strong_20_Emphasis">Adopción de OpenTelemetry como estándar de observabilidad</text:span></text:p>
          </table:table-cell>
          <table:table-cell table:style-name="Table1.A1" office:value-type="string">
            <text:p text:style-name="Table_20_Contents">Permite desacoplar la generación de telemetría de las herramientas de almacenamiento y visualización, facilitando la evolución futura de la solución y evitando dependencia directa de un proveedor específico.</text:p>
          </table:table-cell>
        </table:table-row>
        <table:table-row>
          <table:table-cell table:style-name="Table1.A1" office:value-type="string">
            <text:p text:style-name="Table_20_Contents"><text:span text:style-name="Strong_20_Emphasis">Uso de Loki para almacenamiento de logs</text:span></text:p>
          </table:table-cell>
          <table:table-cell table:style-name="Table1.A1" office:value-type="string">
            <text:p text:style-name="Table_20_Contents">Loki permite almacenar grandes volúmenes de registros operativos con una arquitectura optimizada para ambientes cloud-native y facilita la consulta integrada desde Grafana.</text:p>
          </table:table-cell>
        </table:table-row>
        <table:table-row>
          <table:table-cell table:style-name="Table1.A1" office:value-type="string">
            <text:p text:style-name="Table_20_Contents"><text:span text:style-name="Strong_20_Emphasis">Uso de Tempo para trazabilidad distribuida</text:span></text:p>
          </table:table-cell>
          <table:table-cell table:style-name="Table1.A1" office:value-type="string">
            <text:p text:style-name="Table_20_Contents">Tempo permite almacenar y consultar trazas distribuidas, facilitando la identificación de tiempos de ejecución, dependencias y puntos de falla dentro de los workflows.</text:p>
          </table:table-cell>
        </table:table-row>
        <table:table-row>
          <table:table-cell table:style-name="Table1.A1" office:value-type="string">
            <text:p text:style-name="Table_20_Contents"><text:span text:style-name="Strong_20_Emphasis">Uso de Grafana como plataforma de visualización</text:span></text:p>
          </table:table-cell>
          <table:table-cell table:style-name="Table1.A1" office:value-type="string">
            <text:p text:style-name="Table_20_Contents">Grafana proporciona una interfaz centralizada para consultar logs, trazas y construir dashboards operativos para seguimiento de la solución.</text:p>
          </table:table-cell>
        </table:table-row>
        <table:table-row>
          <table:table-cell table:style-name="Table1.A1" office:value-type="string">
            <text:p text:style-name="Table_20_Contents"><text:span text:style-name="Strong_20_Emphasis">Contenerización mediante Docker</text:span></text:p>
          </table:table-cell>
          <table:table-cell table:style-name="Table1.A1" office:value-type="string">
            <text:p text:style-name="Table_20_Contents">La ejecución de los componentes mediante contenedores permite una instalación reproducible, facilita el despliegue entre ambientes y simplifica la administración de dependencias.</text:p>
          </table:table-cell>
        </table:table-row>
        <table:table-row>
          <table:table-cell table:style-name="Table1.A1" office:value-type="string">
            <text:p text:style-name="Table_20_Contents"><text:span text:style-name="Strong_20_Emphasis">Separación de responsabilidades entre componentes</text:span></text:p>
          </table:table-cell>
          <table:table-cell table:style-name="Table1.A1" office:value-type="string">
            <text:p text:style-name="Table_20_Contents">La arquitectura separa automatización, captura de telemetría, almacenamiento y visualización, permitiendo escalar o reemplazar componentes de manera independient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text:soft-page-break/>Riesgos y mitigacion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iesgo</text:p>
            </table:table-cell>
            <table:table-cell table:style-name="Table2.A1" office:value-type="string">
              <text:p text:style-name="Table_20_Heading">Impacto</text:p>
            </table:table-cell>
            <table:table-cell table:style-name="Table2.A1" office:value-type="string">
              <text:p text:style-name="Table_20_Heading">Mitigación</text:p>
            </table:table-cell>
          </table:table-row>
        </table:table-header-rows>
        <table:table-row>
          <table:table-cell table:style-name="Table2.A1" office:value-type="string">
            <text:p text:style-name="Table_20_Contents"><text:span text:style-name="Strong_20_Emphasis">Limitaciones de ejecución en ambientes locales para capturar eventos internos de n8n</text:span></text:p>
          </table:table-cell>
          <table:table-cell table:style-name="Table2.A1" office:value-type="string">
            <text:p text:style-name="Table_20_Contents">Alto</text:p>
          </table:table-cell>
          <table:table-cell table:style-name="Table2.A1" office:value-type="string">
            <text:p text:style-name="Table_20_Contents">Definir la arquitectura de observabilidad como evolución posterior y realizar la implementación completa en un ambiente controlado con configuración persistente del motor n8n.</text:p>
          </table:table-cell>
        </table:table-row>
        <table:table-row>
          <table:table-cell table:style-name="Table2.A1" office:value-type="string">
            <text:p text:style-name="Table_20_Contents"><text:span text:style-name="Strong_20_Emphasis">Incremento de volumen de logs generados por ejecuciones frecuentes</text:span></text:p>
          </table:table-cell>
          <table:table-cell table:style-name="Table2.A1" office:value-type="string">
            <text:p text:style-name="Table_20_Contents">Medio</text:p>
          </table:table-cell>
          <table:table-cell table:style-name="Table2.A1" office:value-type="string">
            <text:p text:style-name="Table_20_Contents">Implementar políticas de retención, niveles de logging adecuados y filtrado de eventos antes de almacenar información.</text:p>
          </table:table-cell>
        </table:table-row>
        <table:table-row>
          <table:table-cell table:style-name="Table2.A1" office:value-type="string">
            <text:p text:style-name="Table_20_Contents"><text:span text:style-name="Strong_20_Emphasis">Complejidad en la correlación entre logs y trazas</text:span></text:p>
          </table:table-cell>
          <table:table-cell table:style-name="Table2.A1" office:value-type="string">
            <text:p text:style-name="Table_20_Contents">Medio</text:p>
          </table:table-cell>
          <table:table-cell table:style-name="Table2.A1" office:value-type="string">
            <text:p text:style-name="Table_20_Contents">Estandarizar el uso de identificadores de correlación (<text:span text:style-name="Source_20_Text">trace_id</text:span>, <text:span text:style-name="Source_20_Text">execution_id</text:span>) en todos los eventos generados.</text:p>
          </table:table-cell>
        </table:table-row>
        <table:table-row>
          <table:table-cell table:style-name="Table2.A1" office:value-type="string">
            <text:p text:style-name="Table_20_Contents"><text:span text:style-name="Strong_20_Emphasis">Dependencia del runtime interno de n8n para captura de eventos de nodos</text:span></text:p>
          </table:table-cell>
          <table:table-cell table:style-name="Table2.A1" office:value-type="string">
            <text:p text:style-name="Table_20_Contents">Medio</text:p>
          </table:table-cell>
          <table:table-cell table:style-name="Table2.A1" office:value-type="string">
            <text:p text:style-name="Table_20_Contents">Utilizar mecanismos soportados por la plataforma o componentes de integración desacoplados para evitar modificaciones directas al núcleo de n8n.</text:p>
          </table:table-cell>
        </table:table-row>
        <table:table-row>
          <table:table-cell table:style-name="Table2.A1" office:value-type="string">
            <text:p text:style-name="Table_20_Contents"><text:span text:style-name="Strong_20_Emphasis">Fallas en componentes de observabilidad afectan la visibilidad del sistema</text:span></text:p>
          </table:table-cell>
          <table:table-cell table:style-name="Table2.A1" office:value-type="string">
            <text:p text:style-name="Table_20_Contents">Bajo</text:p>
          </table:table-cell>
          <table:table-cell table:style-name="Table2.A1" office:value-type="string">
            <text:p text:style-name="Table_20_Contents">Diseñar la observabilidad como componente independiente, evitando que Loki, Tempo o Grafana sean dependencias críticas para la ejecución de workflows.</text:p>
          </table:table-cell>
        </table:table-row>
        <table:table-row>
          <table:table-cell table:style-name="Table2.A1" office:value-type="string">
            <text:p text:style-name="Table_20_Contents"><text:span text:style-name="Strong_20_Emphasis">Exposición de información sensible en logs</text:span></text:p>
          </table:table-cell>
          <table:table-cell table:style-name="Table2.A1" office:value-type="string">
            <text:p text:style-name="Table_20_Contents">Alto</text:p>
          </table:table-cell>
          <table:table-cell table:style-name="Table2.A1" office:value-type="string">
            <text:p text:style-name="Table_20_Contents">Aplicar políticas de sanitización de datos, evitar registrar información confidencial y controlar accesos mediante mecanismos de autenticación y autorización.</text:p>
          </table:table-cell>
        </table:table-row>
        <table:table-row>
          <table:table-cell table:style-name="Table2.A1" office:value-type="string">
            <text:p text:style-name="Table_20_Contents"><text:span text:style-name="Strong_20_Emphasis">Crecimiento de infraestructura requerida</text:span></text:p>
          </table:table-cell>
          <table:table-cell table:style-name="Table2.A1" office:value-type="string">
            <text:p text:style-name="Table_20_Contents">Medio</text:p>
          </table:table-cell>
          <table:table-cell table:style-name="Table2.A1" office:value-type="string">
            <text:p text:style-name="Table_20_Contents">Definir inicialmente una arquitectura mínima y escalar recursos según volumen de ejecuciones, trazas y retención requerida.</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21T04:03:35.337479538</meta:creation-date>
    <dc:date>2026-07-21T05:26:43.355815383</dc:date>
    <meta:editing-duration>PT1H2M36S</meta:editing-duration>
    <meta:editing-cycles>1</meta:editing-cycles>
    <meta:document-statistic meta:table-count="2" meta:image-count="1" meta:object-count="0" meta:page-count="5" meta:paragraph-count="94" meta:word-count="825" meta:character-count="6010" meta:non-whitespace-character-count="5280"/>
    <meta:generator>LibreOffice/26.2.4.2$Linux_X86_64 LibreOffice_project/620$Build-2</meta:generator>
  </office:meta>
</office:document-meta>
</file>